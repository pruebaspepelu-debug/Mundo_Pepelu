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tyle="italic"/>
    </style:style>
    <style:style style:name="P2" style:family="paragraph" style:parent-style-name="Heading_20_4">
      <style:text-properties fo:font-weight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2. El Entrenamiento de Rehabilitación Completo</text:h>
      <text:p text:style-name="P1">(Duración total: 35-40 minutos)</text:p>
      <text:h text:style-name="P2" text:outline-level="4">Fase 1: Liberación con Rulo de Descarga (10 min)</text:h>
      <text:list text:style-name="L1">
        <text:list-item>
          <text:p text:style-name="P3"><text:span text:style-name="T1">Glúteo y Piramidal (4 min):</text:span> Siéntate en el rulo, cruza el tobillo derecho sobre la rodilla izquierda (forma un "4"). Inclínate hacia el lado derecho y rueda suavemente. <text:span text:style-name="T2">2 min por lado.</text:span></text:p>
        </text:list-item>
        <text:list-item>
          <text:p text:style-name="P3"><text:span text:style-name="T1">Espalda Alta/Dorsales (3 min):</text:span> Rulo bajo los omóplatos (nunca en lumbares ni cuello). Manos en la nuca, levanta el glúteo y rueda desde la base del cuello hasta la mitad de la espalda.</text:p>
        </text:list-item>
        <text:list-item>
          <text:p text:style-name="P3"><text:span text:style-name="T1">Cuádriceps/Flexores (3 min):</text:span> Boca abajo, rueda desde la cadera hasta justo encima de la rodilla para soltar la tensión que tira del psoas.</text:p>
        </text:list-item>
      </text:list>
      <text:h text:style-name="P2" text:outline-level="4">Fase 2: Estiramientos Específicos (12 min)</text:h>
      <text:list text:style-name="L2">
        <text:list-item>
          <text:p text:style-name="P4"><text:span text:style-name="T1">Psoas (Posición de Caballero):</text:span> Una rodilla al suelo, otra adelantada. Empuja la cadera hacia adelante <text:span text:style-name="T1">apretando el glúteo</text:span> del lado de la rodilla apoyada. <text:span text:style-name="T2">2 series de 45" por pierna.</text:span></text:p>
        </text:list-item>
        <text:list-item>
          <text:p text:style-name="P4"><text:span text:style-name="T1">Piramidal (Tumbado):</text:span> Boca arriba, cruza una pierna sobre la otra y tira del muslo hacia el pecho. <text:span text:style-name="T2">2 series de 45" por pierna.</text:span></text:p>
        </text:list-item>
        <text:list-item>
          <text:p text:style-name="P4"><text:span text:style-name="T1">Apertura Pectoral:</text:span> En el marco de una puerta, apoya el antebrazo y gira el tronco. (Vital para hombros adelantados). <text:span text:style-name="T2">45" por lado.</text:span></text:p>
        </text:list-item>
        <text:list-item>
          <text:p text:style-name="P4"><text:span text:style-name="T1">Trapecios/Cuello:</text:span> Inclinación lateral asistida con la mano muy suavemente. <text:span text:style-name="T2">45" por lado.</text:span></text:p>
        </text:list-item>
      </text:list>
      <text:h text:style-name="P2" text:outline-level="4">Fase 3: Activación y Estabilidad (13 min)</text:h>
      <text:list text:style-name="L3">
        <text:list-item>
          <text:p text:style-name="P5"><text:span text:style-name="T1">Puente de Glúteo (Glute Bridge):</text:span> 3 series de 12 repeticiones. (Para "despertar" el glúteo y que el psoas se relaje).</text:p>
        </text:list-item>
        <text:list-item>
          <text:p text:style-name="P5"><text:span text:style-name="T1">Bird-Dog (Cuadrupedia):</text:span> Estira brazo y pierna contraria sin arquear la espalda. 3 series de 10 repeticiones por lado.</text:p>
        </text:list-item>
        <text:list-item>
          <text:p text:style-name="P5"><text:span text:style-name="T1">Retracción Escapular (Letra "W"):</text:span> Tumbado boca abajo, junta los omóplatos fuerte levantando los brazos en forma de W. 3 series de 12 repeticion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02:10:06.008422000</meta:creation-date>
    <dc:date>2026-03-09T02:10:11.760371500</dc:date>
    <meta:editing-duration>PT7S</meta:editing-duration>
    <meta:editing-cycles>1</meta:editing-cycles>
    <meta:document-statistic meta:table-count="0" meta:image-count="0" meta:object-count="0" meta:page-count="1" meta:paragraph-count="15" meta:word-count="278" meta:character-count="1627" meta:non-whitespace-character-count="1374"/>
    <meta:generator>LibreOffice/26.2.1.2$Windows_X86_64 LibreOffice_project/620$Build-2</meta:generator>
  </office:meta>
</office:document-meta>
</file>